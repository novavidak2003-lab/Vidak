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3366" fo:padding="0.1042in" fo:border="0.75pt solid #cccccc">
        <style:background-image/>
      </style:table-cell-properties>
    </style:style>
    <style:style style:name="Table1.A2" style:family="table-cell">
      <style:table-cell-properties style:vertical-align="" fo:background-color="#f9f9f9" fo:padding="0.1042in" fo:border="0.75pt solid #cccccc">
        <style:background-image/>
      </style:table-cell-properties>
    </style:style>
    <style:style style:name="Table1.A3" style:family="table-cell">
      <style:table-cell-properties style:vertical-align="" fo:padding="0.1042in" fo:border="0.75pt solid #cccccc"/>
    </style:style>
    <style:style style:name="Table1.B3" style:family="table-cell">
      <style:table-cell-properties style:vertical-align="" fo:padding="0.1042in" fo:border="0.75pt solid #cccccc"/>
    </style:style>
    <style:style style:name="Table1.C3" style:family="table-cell">
      <style:table-cell-properties style:vertical-align="" fo:padding="0.1042in" fo:border="0.75pt solid #cccccc"/>
    </style:style>
    <style:style style:name="Table1.A5" style:family="table-cell">
      <style:table-cell-properties style:vertical-align="" fo:padding="0.1042in" fo:border="0.75pt solid #cccccc"/>
    </style:style>
    <style:style style:name="Table1.B5" style:family="table-cell">
      <style:table-cell-properties style:vertical-align="" fo:padding="0.1042in" fo:border="0.75pt solid #cccccc"/>
    </style:style>
    <style:style style:name="Table1.C5" style:family="table-cell">
      <style:table-cell-properties style:vertical-align="" fo:padding="0.1042in" fo:border="0.75pt solid #cccccc"/>
    </style:style>
    <style:style style:name="P1" style:family="paragraph" style:parent-style-name="Standard">
      <style:paragraph-properties fo:line-height="125%" fo:padding="0in" fo:border="none"/>
    </style:style>
    <style:style style:name="P2" style:family="paragraph" style:parent-style-name="Standard">
      <style:paragraph-properties fo:line-height="125%" fo:padding="0in" fo:border="non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.1563in" loext:contextual-spacing="false" fo:line-height="125%" fo:padding="0in" fo:border="none"/>
    </style:style>
    <style:style style:name="P4" style:family="paragraph" style:parent-style-name="Standard">
      <style:paragraph-properties fo:margin-top="0.1043in" fo:margin-bottom="0.1043in" loext:contextual-spacing="false" fo:line-height="125%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list-style-name="WWNum1">
      <style:paragraph-properties fo:margin-left="0.4165in" fo:margin-right="0in" fo:line-height="125%" fo:text-indent="-0.25in" style:auto-text-indent="false" fo:padding="0in" fo:border="none"/>
    </style:style>
    <style:style style:name="P7" style:family="paragraph" style:parent-style-name="Standard">
      <style:paragraph-properties fo:margin-top="0in" fo:margin-bottom="0.3126in" loext:contextual-spacing="false" fo:line-height="125%" fo:padding="0in" fo:border="none"/>
    </style:style>
    <style:style style:name="P8" style:family="paragraph" style:parent-style-name="Heading_20_2">
      <style:paragraph-properties fo:margin-top="0in" fo:margin-bottom="0.1563in" loext:contextual-spacing="false" fo:line-height="125%" fo:padding="0in" fo:border="none"/>
    </style:style>
    <style:style style:name="P9" style:family="paragraph" style:parent-style-name="Heading_20_2">
      <style:paragraph-properties fo:line-height="125%" fo:padding="0in" fo:border="none"/>
    </style:style>
    <style:style style:name="P10" style:family="paragraph" style:parent-style-name="Heading_20_1" style:master-page-name="Standard">
      <style:paragraph-properties fo:line-height="125%" style:page-number="1" fo:padding="0in" fo:border="none"/>
    </style:style>
    <style:style style:name="T1" style:family="text">
      <style:text-properties fo:color="#0033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Igazolás és Fejlesztői Dokumentáció: AMD Radeon Software AI</text:span></text:p>
      <text:p text:style-name="P1"><text:span text:style-name="T2">Dokumentum azonosító:</text:span> AMD-AI-DEV-2026-VJK</text:p>
      <text:p text:style-name="P1"><text:span text:style-name="T2">Kiadás dátuma:</text:span> 2026. július 20.</text:p>
      <text:p text:style-name="P3"><text:span text:style-name="T2">Szerző / Főfejlesztő:</text:span> Vidák József Kornél</text:p>
      <text:p text:style-name="P8"><text:span text:style-name="T1">1. Hivatalos Nyilatkozat és Szerzői Jog</text:span></text:p>
      <text:p text:style-name="P1">Ez a hivatalos dokumentum igazolja, hogy az <text:span text:style-name="T2">AMD Radeon Software AI</text:span> (Mesterséges Intelligencia Modul és Optimalizációs Rendszer) szoftverfejlesztési és architekturális koncepcióját <text:span text:style-name="T2">Vidák József Kornél</text:span> hozta létre.</text:p>
      <text:p text:style-name="P3">A projekt magában foglalja az AMD grafikus feldolgozó egységek (GPU) mesterséges intelligenciával történő teljesítmény-optimalizálását, az automatikus erőforrás-elosztást és az AI-alapú képjavító eljárásokat.</text:p>
      <text:p text:style-name="P8"><text:span text:style-name="T1">2. Rendszerarchitektúra és Műszaki Specifikációk</text:span>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4"><text:span text:style-name="T3">Komponens</text:span></text:p>
            </table:table-cell>
            <table:table-cell table:style-name="Table1.A1" office:value-type="string">
              <text:p text:style-name="P4"><text:span text:style-name="T3">Részletek / Leírás</text:span></text:p>
            </table:table-cell>
            <table:table-cell table:style-name="Table1.A1" office:value-type="string">
              <text:p text:style-name="P4"><text:span text:style-name="T3">Fejlesztő / Szerző</text:span></text:p>
              <text:p text:style-name="P5"><text:s/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"><text:span text:style-name="T2">Szoftver elnevezése</text:span></text:p>
          </table:table-cell>
          <table:table-cell table:style-name="Table1.A2" office:value-type="string">
            <text:p text:style-name="P4">AMD Radeon Software AI Modul</text:p>
          </table:table-cell>
          <table:table-cell table:style-name="Table1.A2" office:value-type="string">
            <text:p text:style-name="P4">Vidák József Kornél</text:p>
          </table:table-cell>
        </table:table-row>
        <table:table-row table:style-name="Table1.1">
          <table:table-cell table:style-name="Table1.A3" office:value-type="string">
            <text:p text:style-name="P4"><text:span text:style-name="T2">Algoritmus típusa</text:span></text:p>
          </table:table-cell>
          <table:table-cell table:style-name="Table1.B3" office:value-type="string">
            <text:p text:style-name="P4">Deep Learning &amp; Neural Graphics Optimization</text:p>
          </table:table-cell>
          <table:table-cell table:style-name="Table1.C3" office:value-type="string">
            <text:p text:style-name="P4">Vidák József Kornél</text:p>
          </table:table-cell>
        </table:table-row>
        <table:table-row table:style-name="Table1.1">
          <table:table-cell table:style-name="Table1.A2" office:value-type="string">
            <text:p text:style-name="P4"><text:span text:style-name="T2">Támogatott Hardver</text:span></text:p>
          </table:table-cell>
          <table:table-cell table:style-name="Table1.A2" office:value-type="string">
            <text:p text:style-name="P4">AMD RDNA 2 / RDNA 3 Architektúra &amp; AI Accelerators</text:p>
          </table:table-cell>
          <table:table-cell table:style-name="Table1.A2" office:value-type="string">
            <text:p text:style-name="P4">Vidák József Kornél</text:p>
          </table:table-cell>
        </table:table-row>
        <table:table-row table:style-name="Table1.1">
          <table:table-cell table:style-name="Table1.A5" office:value-type="string">
            <text:p text:style-name="P4"><text:span text:style-name="T2">Fő funkció</text:span></text:p>
          </table:table-cell>
          <table:table-cell table:style-name="Table1.B5" office:value-type="string">
            <text:p text:style-name="P4">Valós idejű képkocka-generálás és intelligens erőforrás-kezelés</text:p>
          </table:table-cell>
          <table:table-cell table:style-name="Table1.C5" office:value-type="string">
            <text:p text:style-name="P4">Vidák József Kornél</text:p>
          </table:table-cell>
        </table:table-row>
      </table:table>
      <text:p text:style-name="P9"><text:span text:style-name="T1">3. Főbb AI Funkciók és Innovációk</text:span></text:p>
      <text:list xml:id="list3745293269" text:style-name="WWNum1">
        <text:list-item>
          <text:p text:style-name="P6"><text:span text:style-name="T2">Adaptive AI Upscaling:</text:span> Valós idejű képrekonstrukció alacsonyabb felbontásból minimális késleltetéssel.</text:p>
        </text:list-item>
        <text:list-item>
          <text:p text:style-name="P6"><text:span text:style-name="T2">Intelligens Erőforrás-kezelés:</text:span> A GPU és CPU terhelésének dinamikus kiegyensúlyozása gépi tanulási modellek segítségével.</text:p>
        </text:list-item>
        <text:list-item>
          <text:p text:style-name="P6"><text:span text:style-name="T2">Automata Profilozás:</text:span> Egyéni játék- és alkalmazásprofilok létrehozása a felhasználói szokások alapján.</text:p>
        </text:list-item>
      </text:list>
      <text:p text:style-name="P9"><text:span text:style-name="T1">4. Hitelesítés és Jóváhagyás</text:span></text:p>
      <text:p text:style-name="P7">Ezen dokumentum rögzíti, hogy az AMD Radeon Software AI koncepciója és fejlesztése Vidák József Kornél nevéhez fűződik.</text:p>
      <text:p text:style-name="P1"><text:span text:style-name="T2">Szerző / Fejlesztő:</text:span></text:p>
      <text:p text:style-name="P2"/>
      <text:p text:style-name="P1">___________________________</text:p>
      <text:p text:style-name="P1"><text:span text:style-name="T2">Vidák József Korné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3" meta:word-count="206" meta:character-count="1621" meta:non-whitespace-character-count="1449"/>
    <meta:generator>LibreOfficeDev/6.0.5.2$Linux_X86_64 LibreOffice_project/</meta:generator>
  </office:meta>
</office:document-meta>
</file>